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tese de doutorado intitulada “</text:span><text:span text:style-name="T3">Implementação eficiente em software de curvas elípticas e emparelhamentos bilineares</text:span><text:span text:style-name="T1">”, de autoria de</text:span><text:span text:style-name="T2"> Diego de Freitas Aranha</text:span><text:span text:style-name="T1">, sob a orientação de</text:span><text:span text:style-name="T2"> Julio López</text:span><text:span text:style-name="T1">, recebeu o prêmio de </text:span><text:span text:style-name="T2">melhor tese de doutorado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40:08.67</dc:date>
    <meta:editing-duration>PT46M</meta:editing-duration>
    <meta:editing-cycles>23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11" meta:character-count="702" meta:non-whitespace-character-count="593"/>
  </office:meta>
</office:document-meta>
</file>