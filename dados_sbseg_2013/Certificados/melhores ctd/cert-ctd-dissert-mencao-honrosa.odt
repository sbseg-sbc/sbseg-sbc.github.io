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  <style:text-properties style:font-name="Liberation Seri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1">Certificamos que a dissertação de mestrado intitulada “</text:span><text:span text:style-name="T3">Segurança do bit menos significativo no RSA e em curvas elípticas</text:span><text:span text:style-name="T1">”, de autoria de</text:span><text:span text:style-name="T2"> Dionathan Nakamura</text:span><text:span text:style-name="T1">, sob a orientação de</text:span><text:span text:style-name="T2"> Routo Terada</text:span><text:span text:style-name="T1">, recebeu </text:span><text:span text:style-name="T2">Menção Honrosa</text:span><text:span text:style-name="T1"> no </text:span><text:span text:style-name="T2">II Concurso de Teses e Dissertações em Segurança do SBSeg 2012</text:span><text:span text:style-name="T1"> –</text:span><text:span text:style-name="T4"> XII Simpósio Brasileiro em Segurança da Informação e de Sistemas Computacionais, </text:span><text:span text:style-name="T1">promovido pela Sociedade Brasileira de Computação e realizado de 19 a 22 de novembro de 2012 em Curitiba PR.</text:span></text:p>
      <text:p text:style-name="P2"/>
      <text:p text:style-name="P2">Curitiba PR, 19 de novembro de 2012<text:tab/>Coordenação do II CTDSeg</text:p>
      <text:p text:style-name="P2"><text:tab/>Routo Terada, IME-USP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8:53:04.38</dc:date>
    <meta:editing-duration>PT45M41S</meta:editing-duration>
    <meta:editing-cycles>24</meta:editing-cycles>
    <meta:generator>LibreOffice/3.5$Windows_x86 LibreOffice_project/3215f89-f603614-ab984f2-7348103-1225a5b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05" meta:character-count="663" meta:non-whitespace-character-count="560"/>
  </office:meta>
</office:document-meta>
</file>