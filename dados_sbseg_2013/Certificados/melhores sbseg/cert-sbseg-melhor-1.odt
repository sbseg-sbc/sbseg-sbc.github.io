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P4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o artigo intitulado “</text:span><text:span text:style-name="T3">Chi-square Attacks on Block-Cipher based Compression Functions</text:span><text:span text:style-name="T1">”, de autoria de</text:span><text:span text:style-name="T2"> Daniel Santana de Freitas</text:span><text:span text:style-name="T5"> e </text:span><text:span text:style-name="T2">Jorge Nakahara Junior, </text:span><text:span text:style-name="T1">recebeu o prêmio de </text:span><text:span text:style-name="T2">Melhor Artigo </text:span><text:span text:style-name="T1">no </text:span><text:span text:style-name="T2">XII Simpósio Brasileiro em Segurança da Informação e de Sistemas Computacionais</text:span><text:span text:style-name="T4"> (SBSeg 2012), </text:span><text:span text:style-name="T1">promovido pela Sociedade Brasileira de Computação e realizado de 19 a 22 de novembro de 2012 em Curitiba PR.</text:span></text:p>
      <text:p text:style-name="P2"/>
      <text:p text:style-name="P2">Curitiba PR, 21 de novembro de 2012<text:tab/>Coordenação do Comitê de Programa</text:p>
      <text:p text:style-name="P2"><text:tab/>Michele Nogueira, UFPR</text:p>
      <text:p text:style-name="P2"><text:tab/>Ricardo Dahab, UNICAMP</text:p>
      <text:p text:style-name="P2"/>
      <text:p text:style-name="P2"><text:tab/>Coordenação Geral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21T16:51:32</dc:date>
    <dc:creator>Carlos Maziero</dc:creator>
    <meta:editing-duration>PT45M41S</meta:editing-duration>
    <meta:editing-cycles>24</meta:editing-cycles>
    <meta:generator>LibreOffice/3.5$Linux_x86 LibreOffice_project/350m1$Build-2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93" meta:character-count="617" meta:non-whitespace-character-count="527"/>
  </office:meta>
</office:document-meta>
</file>