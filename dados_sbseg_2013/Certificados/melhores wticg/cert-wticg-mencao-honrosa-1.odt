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00000057A7AF2A397.png" manifest:media-type="image/png"/>
  <manifest:file-entry manifest:full-path="Pictures/100002010000089600000324C7241C12.png" manifest:media-type="image/png"/>
  <manifest:file-entry manifest:full-path="Pictures/100002010000020D0000015706471FFC.png" manifest:media-type="image/png"/>
  <manifest:file-entry manifest:full-path="Pictures/100000000000021C000001AC8D848AB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48pt" style:font-size-asian="48pt" style:font-size-complex="48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24.659cm" style:type="right"/>
        </style:tab-stops>
      </style:paragraph-properties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margin-top="0.3cm" fo:margin-bottom="0.3cm" fo:text-align="justify" style:justify-single-word="false" fo:background-color="transparent">
        <style:background-image/>
      </style:paragraph-properties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T2" style:family="text">
      <style:text-properties style:font-name="Liberation Serif" fo:font-size="18pt" style:font-size-asian="18pt" style:font-size-complex="18pt"/>
    </style:style>
    <style:style style:name="T3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9.78cm" svg:y="-0.549cm" svg:width="4.981cm" svg:height="3.949cm" draw:z-index="3"><draw:image xlink:href="Pictures/100000000000021C000001AC8D848ABD.png" xlink:type="simple" xlink:show="embed" xlink:actuate="onLoad"/></draw:frame><draw:frame draw:style-name="fr1" draw:name="figuras4" text:anchor-type="paragraph" svg:x="5.147cm" svg:y="0.064cm" svg:width="3.422cm" svg:height="1.252cm" draw:z-index="2"><draw:image xlink:href="Pictures/100002010000089600000324C7241C12.png" xlink:type="simple" xlink:show="embed" xlink:actuate="onLoad"/></draw:frame><draw:frame draw:style-name="fr1" draw:name="figuras5" text:anchor-type="paragraph" svg:x="1.822cm" svg:y="0.064cm" svg:width="3.173cm" svg:height="2.074cm" draw:z-index="1"><draw:image xlink:href="Pictures/100002010000020D0000015706471FFC.png" xlink:type="simple" xlink:show="embed" xlink:actuate="onLoad"/></draw:frame><draw:frame draw:style-name="fr1" draw:name="figuras2" text:anchor-type="paragraph" svg:x="0.014cm" svg:y="0.026cm" svg:width="1.64cm" svg:height="2.318cm" draw:z-index="0"><draw:image xlink:href="Pictures/10000201000003E00000057A7AF2A397.png" xlink:type="simple" xlink:show="embed" xlink:actuate="onLoad"/></draw:frame></text:p>
      <text:p text:style-name="P1"/>
      <text:p text:style-name="P1">Certificado</text:p>
      <text:p text:style-name="P3"><text:span text:style-name="T2">Certificamos que o artigo intitulado “</text:span><text:span text:style-name="T1">Modelagem e Verificação Formal de Aspectos de Tempo Real do Protocolo Kerberos</text:span><text:span text:style-name="T2">”, de autoria de</text:span><text:span text:style-name="T3"> Bruno Cremonezi </text:span><text:span text:style-name="T4">(Universidade Federal de Juiz de Fora) e </text:span><text:span text:style-name="T3">Guilherme Pinto </text:span><text:span text:style-name="T4">(Universidade Federal de Juiz de Fora)</text:span><text:span text:style-name="T3">, </text:span><text:span text:style-name="T2">recebeu </text:span><text:span text:style-name="T3">Menção Honrosa </text:span><text:span text:style-name="T2">no </text:span><text:span text:style-name="T3">VI Workshop de Trabalhos de Iniciação Científica e de Graduação do SBSeg 2012</text:span><text:span text:style-name="T2"> –</text:span><text:span text:style-name="T4"> XII Simpósio Brasileiro em Segurança da Informação e de Sistemas Computacionais, </text:span><text:span text:style-name="T2">promovido pela Sociedade Brasileira de Computação e realizado de 19 a 22 de novembro de 2012 em Curitiba PR.</text:span></text:p>
      <text:p text:style-name="P2">Curitiba PR, 19 de novembro de 2012<text:tab/>Coordenação do VI WTICG</text:p>
      <text:p text:style-name="P2"><text:tab/>Carla Merkle Westphall, UFSC</text:p>
      <text:p text:style-name="P2"><text:tab/></text:p>
      <text:p text:style-name="P2"><text:tab/>Coordenação Geral do SBSeg 2012</text:p>
      <text:p text:style-name="P2"><text:tab/>Aldri dos Santos, UFPR</text:p>
      <text:p text:style-name="P2"><text:tab/>Altair Santin, PUCPR</text:p>
      <text:p text:style-name="P2"><text:tab/>Carlos Maziero, UTFP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Free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Maziero</meta:initial-creator>
    <meta:creation-date>2012-11-11T08:23:20</meta:creation-date>
    <dc:date>2012-11-19T16:39:23</dc:date>
    <dc:creator>Carlos Maziero</dc:creator>
    <meta:editing-duration>PT45M41S</meta:editing-duration>
    <meta:editing-cycles>26</meta:editing-cycles>
    <meta:generator>LibreOffice/3.5$Linux_x86 LibreOffice_project/350m1$Build-2</meta:generator>
    <meta:printed-by>Carlos Maziero</meta:printed-by>
    <meta:print-date>2012-11-11T09:39:44</meta:print-date>
    <meta:document-statistic meta:table-count="0" meta:image-count="4" meta:object-count="0" meta:page-count="1" meta:paragraph-count="9" meta:word-count="116" meta:character-count="739" meta:non-whitespace-character-count="625"/>
  </office:meta>
</office:document-meta>
</file>