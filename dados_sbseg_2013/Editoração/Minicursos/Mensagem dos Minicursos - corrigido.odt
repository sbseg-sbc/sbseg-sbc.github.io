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Times New Roman" fo:font-size="12pt" style:font-size-asian="12pt" style:font-size-complex="12pt"/>
    </style:style>
    <style:style style:name="P2" style:family="paragraph" style:parent-style-name="Standard">
      <style:paragraph-properties fo:margin-left="0cm" fo:margin-right="0cm" fo:text-align="justify" style:justify-single-word="false" fo:text-indent="1.249cm" style:auto-text-indent="false"/>
    </style:style>
    <style:style style:name="P3" style:family="paragraph" style:parent-style-name="Standard" style:master-page-name="Standard">
      <style:paragraph-properties style:page-number="auto"/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P4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style:font-name="Times New Roman" fo:font-size="12pt" style:font-size-asian="12pt" style:font-size-complex="12pt"/>
    </style:style>
    <style:style style:name="P5" style:family="paragraph" style:parent-style-name="Standard">
      <style:paragraph-properties fo:margin-left="0cm" fo:margin-right="0cm" fo:text-align="end" style:justify-single-word="false" fo:text-indent="1.249cm" style:auto-text-indent="false"/>
      <style:text-properties style:font-name="Times New Roman" fo:font-size="12pt" style:font-size-asian="12pt" style:font-size-complex="12pt"/>
    </style:style>
    <style:style style:name="T1" style:family="text">
      <style:text-properties style:font-name="Times New Roman"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Mensagem da Coordenadora de Minicursos</text:p>
      <text:p text:style-name="P2"><text:span text:style-name="T1">O Simpósio Brasileiro em Segurança da Informação e de Sistemas Computacionais (SBSeg) é um evento científico promovido anualmente pela Sociedade Brasileira de Computação (SBC), o qual representa o principal fórum no país para a apresentação de pesquisas e atividades relevantes ligadas à segurança da informação e de sistemas, integrando a comunidade brasileira de pesquisadores e profissionais atuantes nessa área. Entre as principais atividades técnicas do SBSeg encontram-se os minicursos, que têm como objetivo a atualização em temas normalmente não cobertos nas grades curriculares e que despertem grande interesse entre acadêmicos e profissionais. Nesta edição do SBSeg 2013, de um total de 10 submissões de propostas de minicursos foram selecionados quatro minicursos, representando assim uma taxa de aceitação de 40%. O Comitê de Programa foi composto por 8 pesquisadores para a elaboração das revisões, sendo cada proposta avaliada por, pelo menos, 3 desses especialistas. </text:span></text:p>
      <text:p text:style-name="P1"><text:tab/>Este livro reúne então 4 capítulos produzidos pelos autores das propostas de minicursos aceitas. O Capítulo 1 apresenta técnicas e recursos antiforense para a proteção de informações sensíveis, mas não para ocultar provas e evidências de atos ilícitos; O Capítulo 2, além de introduzir noções básicas das principais linhas de pesquisa pós-quântica, apresenta os estudos mais recentes nesta área visando a melhorias dos esquemas relacionados a tamanhos de chaves, overhead de assinaturas e criptogramas; O Capítulo 3 aborda a área de Segurança de Software com uma visão geral e mostra como adaptar e avaliar as soluções existentes no contexto de Sistemas Embarcados; Por fim, o Capítulo 4 descreve os principais desafios e soluções de segurança para prover autenticação e autorização na Internet das Coisas.</text:p>
      <text:p text:style-name="P4">Meus sinceros agradecimentos aos membros da Comissão de Avaliação dos Minicursos do SBSeg 2013 por sua colaboração voluntária e dedicação, lembrando que o sucesso dos minicursos deve ser creditado ao trabalho conjunto desta equipe. Também gostaria de agradecer aos autores que submeteram suas propostas de minicursos e que nos motivam a realizar anualmente este evento de interesse, visibilidade e sucesso crescentes. Finalmente, não poderia de deixar de expressar também os meus sinceros agradecimentos aos coordenadores gerais do SBSeg 2013, Eduardo James Pereira Souto (UFAM) e Eduardo Luzeiro Feitosa (UFAM) por confiarem a mim a tarefa de conduzir os minicursos e pela disponibilidade e orientações providas ao longo do processo. </text:p>
      <text:p text:style-name="P2"><text:span text:style-name="T1">Aproveito esta mensagem para saudar a todos os participantes dos Minicursos do XIII Simpósio Brasileiro em Segurança da Informação e de Sistemas Computacionais com os votos de um excelente curso e de uma excelente estadia em Manaus!</text:span></text:p>
      <text:p text:style-name="P5">Manaus, novembro de 2013.</text:p>
      <text:p text:style-name="P5">Rossana Maria de Castro Andrade (Universidade Federal do Ceará)</text:p>
      <text:p text:style-name="P5">Coordenadora dos Minicursos do SBSeg 201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pt" fo:country="BR" style:letter-kerning="true" style:font-size-asian="10pt" style:language-asian="pt" style:country-asian="BR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0pt" fo:language="pt" fo:country="BR" style:letter-kerning="true" style:font-name-asian="Calibri1" style:font-size-asian="10pt" style:language-asian="pt" style:country-asian="B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fo:line-height="115%" fo:orphans="2" fo:widows="2" style:writing-mode="lr-tb"/>
      <style:text-properties style:use-window-font-color="true" fo:font-size="11pt" style:font-size-asian="11pt" style:language-asian="en" style:country-asian="US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List_20_Paragraph" style:display-name="List Paragraph" style:family="paragraph" style:parent-style-name="Standard" style:default-outline-level="">
      <style:paragraph-properties fo:margin="100%" fo:margin-left="1.27cm" fo:margin-right="0cm" fo:margin-top="0cm" fo:margin-bottom="0.353cm" fo:text-indent="0cm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049cm" fo:margin-bottom="0.049cm" fo:line-height="100%"/>
      <style:text-properties style:font-name="Times New Roman" fo:font-size="12pt" style:font-name-asian="Times New Roman1" style:font-size-asian="12pt" style:language-asian="pt" style:country-asian="BR" style:font-size-complex="12pt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19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78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5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29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7.59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6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3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1.40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nainabezerra</meta:initial-creator>
    <meta:editing-cycles>11</meta:editing-cycles>
    <meta:creation-date>2013-10-03T08:23:00</meta:creation-date>
    <dc:date>2013-10-16T11:32:06</dc:date>
    <meta:editing-duration>PT34M18S</meta:editing-duration>
    <meta:generator>OpenOffice.org/3.4.1$Unix OpenOffice.org_project/341m1$Build-9593</meta:generator>
    <meta:document-statistic meta:table-count="0" meta:image-count="0" meta:object-count="0" meta:page-count="1" meta:paragraph-count="8" meta:word-count="437" meta:character-count="2923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